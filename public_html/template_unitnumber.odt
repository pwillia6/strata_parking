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2C00000061C6B9E63D19B0E2D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Play" svg:font-family="Play" style:font-family-generic="system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16.51cm" fo:margin-left="0cm" table:align="left"/>
    </style:style>
    <style:style style:name="Table2.A" style:family="table-column">
      <style:table-column-properties style:column-width="3.484cm"/>
    </style:style>
    <style:style style:name="Table2.B" style:family="table-column">
      <style:table-column-properties style:column-width="13.026cm"/>
    </style:style>
    <style:style style:name="Table2.A1" style:family="table-cell">
      <style:table-cell-properties fo:padding="0.176cm" fo:border="1pt solid #000000" style:writing-mode="lr-tb"/>
    </style:style>
    <style:style style:name="Table3" style:family="table">
      <style:table-properties style:width="18.443cm" fo:margin-left="0cm" table:align="left"/>
    </style:style>
    <style:style style:name="Table3.A" style:family="table-column">
      <style:table-column-properties style:column-width="9.222cm"/>
    </style:style>
    <style:style style:name="Table3.A1" style:family="table-cell">
      <style:table-cell-properties fo:padding="0cm" fo:border="none" style:writing-mode="lr-tb"/>
    </style:style>
    <style:style style:name="Table4" style:family="table">
      <style:table-properties style:width="18.443cm" fo:margin-left="0cm" table:align="left"/>
    </style:style>
    <style:style style:name="Table4.A" style:family="table-column">
      <style:table-column-properties style:column-width="12.744cm"/>
    </style:style>
    <style:style style:name="Table4.B" style:family="table-column">
      <style:table-column-properties style:column-width="1.111cm"/>
    </style:style>
    <style:style style:name="Table4.C" style:family="table-column">
      <style:table-column-properties style:column-width="4.588cm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left="-0.203cm" fo:margin-right="0cm" fo:margin-top="0cm" fo:margin-bottom="0cm" style:contextual-spacing="false" fo:line-height="100%" fo:text-indent="0cm" style:auto-text-indent="false" fo:padding="1.094cm" fo:border="none" style:shadow="#000000 0cm 0cm">
        <style:tab-stops>
          <style:tab-stop style:position="8.458cm" style:type="center"/>
          <style:tab-stop style:position="16.713cm" style:type="right"/>
        </style:tab-stops>
      </style:paragraph-properties>
      <style:text-properties fo:color="#000000" loext:opacity="100%"/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 fo:padding="1.094cm" fo:border="none" style:shadow="#000000 0cm 0cm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Normal">
      <style:paragraph-properties fo:margin-left="0cm" fo:margin-right="-0.203cm" fo:margin-top="0cm" fo:margin-bottom="0cm" style:contextual-spacing="false" fo:line-height="100%" fo:text-align="end" style:justify-single-word="false" fo:text-indent="0cm" style:auto-text-indent="false" fo:padding="1.094cm" fo:border="none" style:shadow="#000000 0cm 0cm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4" style:family="paragraph" style:parent-style-name="Normal">
      <style:text-properties style:font-name="Arial" style:font-name-asian="Arial" style:font-name-complex="Arial"/>
    </style:style>
    <style:style style:name="P5" style:family="paragraph" style:parent-style-name="Normal">
      <style:paragraph-properties fo:margin-top="0cm" fo:margin-bottom="0cm" style:contextual-spacing="false" fo:line-height="100%"/>
      <style:text-properties style:font-name="Arial" style:font-name-asian="Arial" style:font-name-complex="Arial"/>
    </style:style>
    <style:style style:name="P6" style:family="paragraph" style:parent-style-name="Normal">
      <style:paragraph-properties fo:text-align="end" style:justify-single-word="false"/>
    </style:style>
    <style:style style:name="P7" style:family="paragraph" style:parent-style-name="Normal">
      <style:paragraph-properties fo:margin-top="0cm" fo:margin-bottom="0cm" style:contextual-spacing="false" fo:line-height="100%"/>
    </style:style>
    <style:style style:name="P8" style:family="paragraph" style:parent-style-name="Normal">
      <style:paragraph-properties fo:margin-top="0cm" fo:margin-bottom="0cm" style:contextual-spacing="false" fo:line-height="100%" fo:break-before="page"/>
    </style:style>
    <style:style style:name="P9" style:family="paragraph" style:parent-style-name="Normal">
      <style:paragraph-properties fo:margin-top="0cm" fo:margin-bottom="0cm" style:contextual-spacing="false" fo:line-height="100%"/>
      <style:text-properties style:font-name="Times New Roman" fo:language="en" fo:country="AU" style:font-name-asian="Times New Roman" style:font-name-complex="Times New Roman"/>
    </style:style>
    <style:style style:name="P10" style:family="paragraph" style:parent-style-name="Heading_20_1" style:master-page-name="MP0">
      <style:paragraph-properties fo:text-align="center" style:justify-single-word="false" style:page-number="1" fo:break-before="page"/>
    </style:style>
    <style:style style:name="P11" style:family="paragraph" style:parent-style-name="Heading_20_2">
      <style:paragraph-properties fo:text-align="center" style:justify-single-word="false"/>
    </style:style>
    <style:style style:name="P12" style:family="paragraph" style:parent-style-name="Normal">
      <style:paragraph-properties fo:margin-top="0cm" fo:margin-bottom="0cm" style:contextual-spacing="false" fo:line-height="115%" fo:orphans="0" fo:widows="0" fo:padding="1.094cm" fo:border="none" style:shadow="#000000 0cm 0cm"/>
      <style:text-properties fo:color="#000000" loext:opacity="100%"/>
    </style:style>
    <style:style style:name="T1" style:family="text">
      <style:text-properties fo:color="#ff0000" loext:opacity="100%" style:font-name="Arial" fo:font-size="30pt" style:font-name-asian="Arial" style:font-size-asian="30pt" style:font-name-complex="Arial" style:font-size-complex="30pt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color="#1155cc" loext:opacity="100%" style:font-name="Arial" style:text-underline-style="solid" style:text-underline-width="auto" style:text-underline-color="font-color" style:text-underline-mode="continuous" style:text-overline-mode="continuous" style:text-line-through-mode="continuous" style:font-name-asian="Arial" style:font-name-complex="Ari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bookmark text:name="_rjg4n4qlcal"/><text:span text:style-name="Default_20_Paragraph_20_Font"><text:span text:style-name="T1">Notice of Removal</text:span></text:span></text:h>
      <text:h text:style-name="P11" text:outline-level="2"><text:bookmark text:name="_animkcefmy5e"/>[onshow.plate] – [onshow.datefrom] to [onshow.dateto] unit #: [onshow.unitnumber]</text:h>
      <text:p text:style-name="P4"><text:line-break/>Our by-laws exist to ensure parking spaces are provided to ensure that visitors to our community have convenient access during their short-term visits. Visitor spaces are not intended for use by residents or for long-term parking by any individual, as this restricts access for genuine visitors. <text:s text:c="2"/>Other spaces are for specific purposes or to enable safe movement of vehicles in the parking space and cannot be used for general parking.<text:line-break/><text:line-break/>This vehicle has been found to violate the following by-laws referenced below:</text:p>
      <table:table table:name="Table2" table:style-name="Table2">
        <table:table-column table:style-name="Table2.A"/>
        <table:table-column table:style-name="Table2.B"/>
        <table:table-row table:style-name="TableLine140318024441696">
          <table:table-cell table:style-name="Table2.A1" office:value-type="string">
            <text:p text:style-name="P5">[onshow.M281] observations</text:p>
          </table:table-cell>
          <table:table-cell table:style-name="Table2.A1" office:value-type="string">
            <text:p text:style-name="P5">By-law 28.1. No Parking in Visitor Parking by a Resident</text:p>
          </table:table-cell>
        </table:table-row>
        <table:table-row table:style-name="TableLine140318024458016">
          <table:table-cell table:style-name="Table2.A1" office:value-type="string">
            <text:p text:style-name="P5">[onshow.M283] observations</text:p>
          </table:table-cell>
          <table:table-cell table:style-name="Table2.A1" office:value-type="string">
            <text:p text:style-name="P5">By-law 28.3. No Parking on Common Property except in Visitor Parking spaces as a visitor</text:p>
          </table:table-cell>
        </table:table-row>
        <table:table-row table:style-name="TableLine140318024459392">
          <table:table-cell table:style-name="Table2.A1" office:value-type="string">
            <text:p text:style-name="P5">[onshow.M284] days</text:p>
          </table:table-cell>
          <table:table-cell table:style-name="Table2.A1" office:value-type="string">
            <text:p text:style-name="P5">By-law 28.4. Visitors parking more than 24 hours per week are no longer considered a visitor</text:p>
          </table:table-cell>
        </table:table-row>
        <table:table-row table:style-name="TableLine140318024460208">
          <table:table-cell table:style-name="Table2.A1" office:value-type="string">
            <text:p text:style-name="P5">[onshow.M286] </text:p>
          </table:table-cell>
          <table:table-cell table:style-name="Table2.A1" office:value-type="string">
            <text:p text:style-name="P5">By-law 28.6. No Parking in Visitor Parking by unless visiting</text:p>
          </table:table-cell>
        </table:table-row>
      </table:table>
      <text:p text:style-name="P4"><text:line-break/>Once processed, an administration fee of $165 (by-law 28.8.ii) will be applied for this notice. The fee will not be waived when a by-law violation is excessive, a previous warning has been given, or you do not contact the building manager. The cost will be included as a strata debt against the unit owner. <text:s/>The NSW Civil and Administrative Tribunal can also order a penalty of up to $1100 for these breaches. <text:s text:c="2"/>Please get in touch with the NSW Department of Fair Trading if you require clarification (13 32 20) regarding strata parking administration fees.<text:line-break/><text:line-break/>Please get in touch with building management for any clarification, such as copies of the by-laws and the processing of this notice. <text:s/><text:line-break/><text:line-break/></text:p>
      <table:table table:name="Table3" table:style-name="Table3">
        <table:table-column table:style-name="Table3.A" table:number-columns-repeated="2"/>
        <table:table-row table:style-name="TableLine140318024462480">
          <table:table-cell table:style-name="Table3.A1" office:value-type="string">
            <text:p text:style-name="Normal"><text:span text:style-name="Default_20_Paragraph_20_Font"><text:span text:style-name="T2">Kingston Quarter Building Management<text:line-break/>STRATA PLAN 98937<text:line-break/>20 Nancarrow Ave, Meadowbank, NSW 2114<text:line-break/>E </text:span></text:span><text:a xlink:type="simple" xlink:href="mailto:management@kingstonquarter.com.au" office:target-frame-name="_top" xlink:show="replace" text:style-name="Internet_20_link" text:visited-style-name="Visited_20_Internet_20_Link"><text:span text:style-name="Default_20_Paragraph_20_Font"><text:span text:style-name="T3">management@kingstonquarter.com.au</text:span></text:span></text:a><text:span text:style-name="Default_20_Paragraph_20_Font"><text:span text:style-name="T2"><text:line-break/>P (02) 7208 8763</text:span></text:span></text:p>
          </table:table-cell>
          <table:table-cell table:style-name="Table3.A1" office:value-type="string">
            <text:p text:style-name="P6"><draw:frame draw:style-name="fr1" draw:name="image1.jpg" text:anchor-type="as-char" svg:y="0cm" svg:width="5.724cm" style:rel-width="scale" svg:height="1.85cm" style:rel-height="scale" draw:z-index="0"><draw:image xlink:href="Pictures/100000000000012C00000061C6B9E63D19B0E2D0.jpg" xlink:type="simple" xlink:show="embed" xlink:actuate="onLoad" draw:mime-type="image/jpeg"/><svg:desc>A close-up of words

Description automatically generated</svg:desc></draw:frame></text:p>
          </table:table-cell>
        </table:table-row>
      </table:table>
      <text:p text:style-name="P7"/>
      <text:p text:style-name="P8"/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140318291963712">
          <table:table-cell table:style-name="Table4.A1" office:value-type="string">
            <text:p text:style-name="P9">[onshow.image]</text:p>
            <text:p text:style-name="P9">[onshow.image;ope=changepic;adjust=10%;tagpos=after]</text:p>
            <text:p text:style-name="P9">1000% Added</text:p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Play" svg:font-family="Play" style:font-family-generic="system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A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A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Play" fo:font-family="Play" style:font-family-generic="system" fo:font-size="20pt" style:font-name-asian="Play" style:font-family-asian="Play" style:font-family-generic-asian="system" style:font-size-asian="20pt" style:font-name-complex="Play" style:font-family-complex="Play" style:font-family-generic-complex="system" style:font-size-complex="20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Play" fo:font-family="Play" style:font-family-generic="system" fo:font-size="16pt" style:font-name-asian="Play" style:font-family-asian="Play" style:font-family-generic-asian="system" style:font-size-asian="16pt" style:font-name-complex="Play" style:font-family-complex="Play" style:font-family-generic-complex="system" style:font-size-complex="16pt" fo:hyphenate="false" loext:hyphenation-no-caps="false"/>
    </style:style>
    <style:style style:name="Normal" style:family="paragraph">
      <style:paragraph-properties fo:margin-top="0cm" fo:margin-bottom="0.282cm" style:contextual-spacing="false" fo:line-height="116%" fo:hyphenation-ladder-count="no-limit"/>
      <style:text-properties style:font-name="Aptos" fo:font-family="Aptos" style:font-family-generic="swiss" style:font-pitch="variable" fo:language="en" fo:country="US" style:font-name-asian="Aptos" style:font-family-asian="Aptos" style:font-family-generic-asian="swiss" style:font-pitch-asian="variable" style:language-asian="en" style:country-asian="GB" style:font-name-complex="Aptos" style:font-family-complex="Aptos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Play" fo:font-family="Play" style:font-family-generic="system" fo:font-size="20pt" fo:language="en" fo:country="US" style:font-name-asian="Play" style:font-family-asian="Play" style:font-family-generic-asian="system" style:font-size-asian="20pt" style:language-asian="en" style:country-asian="GB" style:font-name-complex="Play" style:font-family-complex="Play" style:font-family-generic-complex="system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Play" fo:font-family="Play" style:font-family-generic="system" fo:font-size="16pt" fo:language="en" fo:country="US" style:font-name-asian="Play" style:font-family-asian="Play" style:font-family-generic-asian="system" style:font-size-asian="16pt" style:language-asian="en" style:country-asian="GB" style:font-name-complex="Play" style:font-family-complex="Play" style:font-family-generic-complex="system" style:font-size-complex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  <dc:title/>
    <dc:description/>
    <dc:subject/>
    <meta:initial-creator>Paul Williamson</meta:initial-creator>
    <meta:creation-date>2025-03-01T20:25:00Z</meta:creation-date>
    <dc:date>2025-03-02T07:27:15.032137929</dc:date>
    <meta:editing-cycles>3</meta:editing-cycles>
    <meta:editing-duration>PT1M5S</meta:editing-duration>
    <meta:document-statistic meta:table-count="3" meta:image-count="1" meta:object-count="0" meta:page-count="2" meta:paragraph-count="17" meta:word-count="290" meta:character-count="1915" meta:non-whitespace-character-count="1626"/>
    <meta:template xlink:type="simple" xlink:actuate="onRequest" xlink:title="" xlink:href="Normal.dotm"/>
  </office:meta>
</office:document-meta>
</file>