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lay" svg:font-family="Play" style:font-family-generic="system" svg:panose-1="2 11 6 4 2 2 2 2 2 4"/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align="center" style:page-number="1"/>
    </style:style>
    <style:style style:name="T15" style:parent-style-name="DefaultParagraphFont" style:family="text">
      <style:text-properties style:font-name="Arial" style:font-name-asian="Arial" style:font-name-complex="Arial" fo:color="#FF0000" fo:font-size="30pt" style:font-size-asian="30pt" style:font-size-complex="30pt"/>
    </style:style>
    <style:style style:name="P16" style:parent-style-name="Heading2" style:family="paragraph">
      <style:paragraph-properties fo:text-align="center"/>
    </style:style>
    <style:style style:name="P17" style:parent-style-name="Normal" style:family="paragraph">
      <style:text-properties style:font-name="Arial" style:font-name-asian="Arial" style:font-name-complex="Arial"/>
    </style:style>
    <style:style style:name="TableColumn19" style:family="table-column">
      <style:table-column-properties style:column-width="1.3715in" style:use-optimal-column-width="false"/>
    </style:style>
    <style:style style:name="TableColumn20" style:family="table-column">
      <style:table-column-properties style:column-width="5.1284in" style:use-optimal-column-width="false"/>
    </style:style>
    <style:style style:name="Table18" style:family="table">
      <style:table-properties style:width="6.5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41" style:parent-style-name="Normal" style:family="paragraph">
      <style:text-properties style:font-name="Arial" style:font-name-asian="Arial" style:font-name-complex="Arial"/>
    </style:style>
    <style:style style:name="T42" style:parent-style-name="DefaultParagraphFont" style:family="text">
      <style:text-properties style:font-name="Arial" style:font-name-asian="Arial" style:font-name-complex="Arial"/>
    </style:style>
    <style:style style:name="T43" style:parent-style-name="DefaultParagraphFont" style:family="text">
      <style:text-properties style:font-name="Arial" style:font-name-asian="Arial" style:font-name-complex="Arial"/>
    </style:style>
    <style:style style:name="T44" style:parent-style-name="DefaultParagraphFont" style:family="text">
      <style:text-properties style:font-name="Arial" style:font-name-asian="Arial" style:font-name-complex="Arial"/>
    </style:style>
    <style:style style:name="T45" style:parent-style-name="DefaultParagraphFont" style:family="text">
      <style:text-properties style:font-name="Arial" style:font-name-asian="Arial" style:font-name-complex="Arial"/>
    </style:style>
    <style:style style:name="T46" style:parent-style-name="DefaultParagraphFont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style:font-name="Arial" style:font-name-asian="Arial" style:font-name-complex="Arial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bookmark-start text:name="_rjg4n4qlcal"/><text:bookmark-end text:name="_rjg4n4qlcal"/><text:span text:style-name="T15">Notice of Removal</text:span></text:h>
      <text:h text:style-name="P16" text:outline-level="2"><text:bookmark-start text:name="_animkcefmy5e"/><text:bookmark-end text:name="_animkcefmy5e"/>[onshow.plate] – [onshow.datefrom] to [onshow.dateto] unit #: [onshow.unitno]</text:h>
      <text:p text:style-name="P17"><text:line-break/>Our by-laws exist to ensure parking spaces are provided to ensure that visitors to our community have convenient access during their short-term visits. Visitor spaces are not intended for use by residents or for long-term parking by any individual, as this restricts access for genuine visitors. <text:s text:c="2"/>Other spaces are for specific purposes or to enable safe movement of vehicles in the parking space and cannot be used for general parking.<text:line-break/><text:line-break/>This vehicle has been found to violate the following by-laws referenced below:</text:p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[onshow.M281] observations</text:p>
          </table:table-cell>
          <table:table-cell table:style-name="TableCell24">
            <text:p text:style-name="P25">By-law 28.1. No Parking in Visitor Parking by a Resident</text:p>
          </table:table-cell>
        </table:table-row>
        <table:table-row table:style-name="TableRow26">
          <table:table-cell table:style-name="TableCell27">
            <text:p text:style-name="P28">[onshow.M283] observations</text:p>
          </table:table-cell>
          <table:table-cell table:style-name="TableCell29">
            <text:p text:style-name="P30">By-law 28.3. No Parking on Common Property except in Visitor Parking spaces as a visitor</text:p>
          </table:table-cell>
        </table:table-row>
        <table:table-row table:style-name="TableRow31">
          <table:table-cell table:style-name="TableCell32">
            <text:p text:style-name="P33">[onshow.M284] days</text:p>
          </table:table-cell>
          <table:table-cell table:style-name="TableCell34">
            <text:p text:style-name="P35">By-law 28.4. Visitors parking more than 24 hours per week are no longer considered a visitor</text:p>
          </table:table-cell>
        </table:table-row>
        <table:table-row table:style-name="TableRow36">
          <table:table-cell table:style-name="TableCell37">
            <text:p text:style-name="P38">[onshow.M286]<text:s/></text:p>
          </table:table-cell>
          <table:table-cell table:style-name="TableCell39">
            <text:p text:style-name="P40">By-law 28.6. No Parking in Visitor Parking by unless visiting</text:p>
          </table:table-cell>
        </table:table-row>
      </table:table>
      <text:p text:style-name="P41"><text:line-break/>One processed an administration fee of $165 (by-law 28.8.ii) will be for this notice. The fee will not be waived in the situation where by-law violation is excessive, a previous warning has been given or, you do not contact the building manager. The fee will be included as a strata debt against the unit owner. <text:s/>The NSW Civil and Administrative Tribunal can also order a penalty of up to $1100 for these breaches. <text:s text:c="2"/>Please contact NSW department of Fair Trading if you require clarification (13 32 20) regarding strata parking administration fees.<text:line-break/><text:line-break/>Please contact building management for any clarification, such as copies of the by-laws and the processing of this notice. <text:s/><text:line-break/></text:p>
      <text:p text:style-name="Normal"><text:span text:style-name="T42">Kingston Quarter Building Management</text:span><text:span text:style-name="T43"><text:line-break/>STRATA PLAN 98937</text:span><text:span text:style-name="T44"><text:line-break/>20 Nancarrow Ave, Meadowbank, NSW 2114</text:span><text:span text:style-name="T45"><text:line-break/>E<text:s/></text:span><text:a xlink:href="mailto:management@kingstonquarter.com.au" office:target-frame-name="_top" xlink:show="replace"><text:span text:style-name="T46">management@kingstonquarter.com.au</text:span></text:a><text:span text:style-name="T47"><text:line-break/>P (02) 7208 8763</text:span><draw:frame draw:z-index="251659264" draw:style-name="a0" draw:name="image1.jpg" text:anchor-type="paragraph" svg:x="4.25in" svg:y="0.13133in" svg:width="2.25311in" svg:height="0.72851in" style:rel-width="scale" style:rel-height="scale"><draw:image xlink:href="media/image1.jpg" xlink:type="simple" xlink:show="embed" xlink:actuate="onLoad"/><svg:title/><svg:desc>A close-up of words

Description automatically generated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lay" svg:font-family="Play" style:font-family-generic="system" svg:panose-1="2 11 6 4 2 2 2 2 2 4"/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Play" style:font-name-asian="Play" style:font-name-complex="Play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Play" style:font-name-asian="Play" style:font-name-complex="Play" fo:color="#0F4761" fo:font-size="16pt" style:font-size-asian="16pt" style:font-size-complex="16pt" fo:hyphenate="false"/>
    </style:style>
    <style:style style:name="Normal" style:display-name="Normal" style:family="paragraph">
      <style:paragraph-properties fo:margin-bottom="0.1111in" fo:line-height="116%"/>
      <style:text-properties style:font-name="Aptos" style:font-name-asian="Aptos" style:font-name-complex="Aptos" fo:language="en" fo:country="US" style:language-asian="en" style:country-asian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Play" style:font-name-asian="Play" style:font-name-complex="Play" fo:color="#0F4761" fo:font-size="20pt" style:font-size-asian="20pt" style:font-size-complex="20pt" fo:language="en" fo:country="US" style:language-asian="en" style:country-asian="GB"/>
    </style:style>
    <style:style style:name="Heading2Char" style:display-name="Heading 2 Char" style:family="text" style:parent-style-name="DefaultParagraphFont">
      <style:text-properties style:font-name="Play" style:font-name-asian="Play" style:font-name-complex="Play" fo:color="#0F4761" fo:font-size="16pt" style:font-size-asian="16pt" style:font-size-complex="16pt" fo:language="en" fo:country="US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5in"/>
      </style:header-style>
      <style:footer-style>
        <style:header-footer-properties style:dynamic-spacing="true" fo:min-height="-0.25in"/>
      </style:footer-style>
    </style:page-layout>
    <style:style style:name="P2" style:parent-style-name="Normal" style:family="paragraph">
      <style:paragraph-properties fo:widows="0" fo:orphans="0" fo:border="0in solid #FFFFFF" fo:padding="0.4305in" style:shadow="#000000 0in 0in" fo:margin-bottom="0in" fo:line-height="115%"/>
      <style:text-properties fo:color="#000000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Column6" style:family="table-column">
      <style:table-column-properties style:column-width="2.1666in" style:use-optimal-column-width="false"/>
    </style:style>
    <style:style style:name="Table3" style:family="table">
      <style:table-properties style:width="6.5in" fo:margin-left="0in" table:align="left"/>
    </style:style>
    <style:style style:name="TableRow7" style:family="table-row">
      <style:table-row-properties style:min-row-height="0.2083in"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border="0in solid #FFFFFF" fo:padding="0.4305in" style:shadow="#000000 0in 0in" fo:margin-bottom="0in" fo:line-height="100%" fo:margin-left="-0.0798in">
        <style:tab-stops>
          <style:tab-stop style:type="center" style:position="3.3298in"/>
          <style:tab-stop style:type="right" style:position="6.5798in"/>
        </style:tab-stops>
      </style:paragraph-properties>
      <style:text-properties fo:color="#000000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border="0in solid #FFFFFF" fo:padding="0.4305in" style:shadow="#000000 0in 0in" fo:text-align="center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color="#000000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border="0in solid #FFFFFF" fo:padding="0.4305in" style:shadow="#000000 0in 0in" fo:text-align="end" fo:margin-bottom="0in" fo:line-height="100%" fo:margin-right="-0.0798in">
        <style:tab-stops>
          <style:tab-stop style:type="center" style:position="3.25in"/>
          <style:tab-stop style:type="right" style:position="6.5in"/>
        </style:tab-stops>
      </style:paragraph-properties>
      <style:text-properties fo:color="#000000"/>
    </style:style>
    <style:style style:name="P14" style:parent-style-name="Normal" style:family="paragraph">
      <style:paragraph-properties fo:border="0in solid #FFFFFF" fo:padding="0.4305in" style:shadow="#000000 0in 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color="#000000"/>
    </style:style>
  </office:automatic-styles>
  <office:master-styles>
    <style:master-page style:name="MP0" style:page-layout-name="PL0">
      <style:footer>
        <text:p text:style-name="P2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/>
            </table:table-cell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</table:table-row>
        </table:table>
        <text:p text:style-name="P1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ul Williamson</meta:initial-creator>
    <dc:creator>Paul Williamson</dc:creator>
    <meta:creation-date>2025-02-16T03:39:00Z</meta:creation-date>
    <dc:date>2025-02-16T03:39:00Z</dc:date>
    <meta:template xlink:href="Normal.dotm" xlink:type="simple"/>
    <meta:editing-cycles>2</meta:editing-cycles>
    <meta:editing-duration>PT0S</meta:editing-duration>
    <meta:document-statistic meta:page-count="1" meta:paragraph-count="3" meta:word-count="282" meta:character-count="1890" meta:row-count="13" meta:non-whitespace-character-count="1611"/>
  </office:meta>
</office:document-meta>
</file>